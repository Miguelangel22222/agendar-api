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6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línica del Pie Isabel Aguiar</text:p>
      <text:p text:style-name="P1">Galería Uruguay 18 de Julio 966, local 6</text:p>
      <text:p text:style-name="Standard">Cel/WhatsApp 094 943 875 </text:p>
      <text:p text:style-name="Standard">Gmail ysabelcirta@gmail.com</text:p>
      <text:p text:style-name="Standard">Pedicuría Técnica</text:p>
      <text:p text:style-name="Standard">Habilitación de MS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3:38:13.676181031</meta:creation-date>
    <dc:date>2026-07-05T19:00:43.895177663</dc:date>
    <meta:editing-duration>PT5H22M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24" meta:character-count="157" meta:non-whitespace-character-count="138"/>
  </office:meta>
</office:document-meta>
</file>